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2a00ff"/>
    </style:style>
    <style:style style:name="T6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5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uite d'élément mis en chaine pour un refresh pad dans vigru dans le cas d'un refresh normal d'un pad avec serveur root de spectres.</text:p>
      <text:p text:style-name="Standard"/>
      <text:p text:style-name="Standard">-&gt;Clic bouton </text:p>
      <text:p text:style-name="Standard"/>
      <text:p text:style-name="Standard">GVToobarVS : GetButton(i++)-&gt;Connect("Clicked()", "GVToolBarVS", this, "RefreshPad()")</text:p>
      <text:p text:style-name="Standard">GVToobarVS ::RefreshPad()</text:p>
      <text:p text:style-name="Standard">Vigru:RefreshPad()</text:p>
      <text:p text:style-name="Standard"><text:tab/>GVPad* gvpad =GetSelectedPad();</text:p>
      <text:p text:style-name="Standard"><text:tab/>gvpad-&gt;RefreshPad();</text:p>
      <text:p text:style-name="Standard"><text:s/>GVPad::RefreshPad(bool getanewone)</text:p>
      <text:p text:style-name="Standard"><text:tab/>fPadDB-&gt;Refresh(getanewone, tab, nbpad, fOption2D,</text:p>
      <text:p text:style-name="Standard"><text:tab/><text:tab/><text:tab/><text:tab/>main-&gt;GetSpeManager()-&gt;GetListDevice());</text:p>
      <text:p text:style-name="Standard">GSpectraDB::Refresh(bool getanewone, int tab, int nbpad, TString option2D,</text:p>
      <text:p text:style-name="Standard"><text:tab/><text:tab/>GListDevice* listdev)</text:p>
      <text:p text:style-name="Standard"><text:tab/>spnew = (TNamed *) id-&gt;GetSpectrumNetOrFileOrMem(listdev);</text:p>
      <text:p text:style-name="Standard"><text:tab/></text:p>
      <text:p text:style-name="Standard">GSpectrumIdentity::GetSpectrumNetOrFileOrMem(GListDevice* listdev)</text:p>
      <text:p text:style-name="Standard"><text:tab/>sp = GetSpectrumNet(listdev);</text:p>
      <text:p text:style-name="Standard"/>
      <text:p text:style-name="Standard"><text:s/>GSpectrumIdentity::GetSpectrumNet(GListDevice* listdev)</text:p>
      <text:p text:style-name="Standard"><text:tab/><text:tab/><text:span text:style-name="T2">if</text:span><text:span text:style-name="T4"> (SourceType == </text:span><text:span text:style-name="T6">"GRU"</text:span><text:span text:style-name="T4">) {</text:span></text:p>
      <text:p text:style-name="P1"><text:span text:style-name="T3"><text:tab/><text:tab/><text:tab/></text:span><text:span text:style-name="T1">if</text:span><text:span text:style-name="T3"> (listdev-&gt;GetNetClientRoot() == NULL)</text:span></text:p>
      <text:p text:style-name="P1"><text:span text:style-name="T3"><text:tab/><text:tab/><text:tab/>listdev-&gt;SetNetClientRoot(</text:span><text:span text:style-name="T1">new</text:span><text:span text:style-name="T3"> GNetClientRoot((</text:span><text:span text:style-name="T1">char</text:span><text:span text:style-name="T3">*) </text:span><text:span text:style-name="T5">"localhost"</text:span><text:span text:style-name="T3">));</text:span></text:p>
      <text:p text:style-name="P1"><text:span text:style-name="T3"><text:tab/><text:tab/>((</text:span><text:span text:style-name="T7">GNetClientRoot</text:span><text:span text:style-name="T3">*) (listdev-&gt;GetNetClientRoot()))&gt;GetSpectrum(</text:span><text:span text:style-name="T1">this</text:span><text:span text:style-name="T3">);</text:span></text:p>
      <text:p text:style-name="P1"><text:span text:style-name="T3"><text:tab/><text:tab/>GListDevice:GetNetClientRoot() retourne le pointeur sur le device</text:span></text:p>
      <text:p text:style-name="P1"><text:span text:style-name="T3"/></text:p>
      <text:p text:style-name="P1"><text:span text:style-name="T3">GNetClientRoot::GetSpectrum(GSpectrumIdentity* id)</text:span></text:p>
      <text:p text:style-name="P1"><text:span text:style-name="T3"><text:tab/><text:tab/>GiveWords(fSock, &amp;command);</text:span></text:p>
      <text:p text:style-name="P1"><text:span text:style-name="T3"><text:tab/>GiveWords(fSock, &amp;command);</text:span></text:p>
      <text:p text:style-name="P3"><text:span text:style-name="T4"><text:tab/>sp = (TNamed*)ReceiveObject(fSock);</text:span></text:p>
      <text:p text:style-name="P1"><text:span text:style-name="T3"><text:tab/>id-&gt;SetSpectrum(sp);</text:span></text:p>
      <text:p text:style-name="P1"><text:span text:style-name="T3"><text:tab/>if ((sp)) {</text:span></text:p>
      <text:p text:style-name="P1"><text:span text:style-name="T3"><text:tab/><text:tab/>id-&gt;DeleteSpectrumInstance();</text:span></text:p>
      <text:p text:style-name="P1"><text:span text:style-name="T3"><text:tab/><text:tab/>id-&gt;SetSpectrum(sp);</text:span></text:p>
      <text:p text:style-name="P1"><text:span text:style-name="T3"><text:tab/>}</text:span></text:p>
      <text:p text:style-name="P1"><text:span text:style-name="T3"><text:tab/><text:tab/><text:tab/></text:span></text:p>
      <text:p text:style-name="P1"><text:span text:style-name="T3">GSpectrumIdentity::GetSpectrumNet(GListDevice* listdev)</text:span></text:p>
      <text:p text:style-name="P2"><text:tab/><text:tab/>sp = GetSpectrum();// return juste le pointeur</text:p>
      <text:p text:style-name="P2"><text:tab/><text:tab/>listdev-&gt;SetNetClientRoot(listdev-&gt;GetNetClientRoot());</text:p>
      <text:p text:style-name="P3"><text:span text:style-name="T4"><text:tab/>}</text:span></text:p>
      <text:p text:style-name="P3"><text:span text:style-name="T4"><text:tab/></text:span></text:p>
      <text:p text:style-name="Standard">GVPad::RefreshPad(bool getanewone)</text:p>
      <text:p text:style-name="Standard"><text:tab/>ResizePad()</text:p>
      <text:p text:style-name="Standard"><text:tab/>Updat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geard </meta:initial-creator>
    <meta:creation-date>2015-07-22T13:42:19</meta:creation-date>
    <dc:date>2015-07-23T15:47:05</dc:date>
    <dc:creator>legeard </dc:creator>
    <meta:editing-duration>PT18H14M20S</meta:editing-duration>
    <meta:editing-cycles>4</meta:editing-cycles>
    <meta:generator>LibreOffice/3.4$Unix LibreOffice_project/340m1$Build-502</meta:generator>
    <meta:printed-by>legeard </meta:printed-by>
    <meta:print-date>2015-07-23T09:10:53</meta:print-date>
    <meta:document-statistic meta:table-count="0" meta:image-count="0" meta:object-count="0" meta:page-count="1" meta:paragraph-count="40" meta:word-count="120" meta:character-count="1497" meta:non-whitespace-character-count="1365"/>
  </office:meta>
</office:document-meta>
</file>